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flask</text:p>
      <text:p text:style-name="Standard">flask-sqlalchemy</text:p>
      <text:p text:style-name="Standard">gunicorn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23T15:26:07.206804000</meta:creation-date>
    <dc:date>2026-06-23T15:26:18.719891300</dc:date>
    <meta:editing-duration>PT12S</meta:editing-duration>
    <meta:editing-cycles>1</meta:editing-cycles>
    <meta:document-statistic meta:table-count="0" meta:image-count="0" meta:object-count="0" meta:page-count="1" meta:paragraph-count="3" meta:word-count="3" meta:character-count="29" meta:non-whitespace-character-count="29"/>
    <meta:generator>LibreOffice/26.2.4.1$Windows_X86_64 LibreOffice_project/1a563c585d9fd784842a5a6101a714090c4fd0fd</meta:generator>
  </office:meta>
</office:document-meta>
</file>